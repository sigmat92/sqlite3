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615cm" table:align="left"/>
    </style:style>
    <style:style style:name="Table1.A" style:family="table-column">
      <style:table-column-properties style:column-width="3.485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4.119cm"/>
    </style:style>
    <style:style style:name="Table1.D" style:family="table-column">
      <style:table-column-properties style:column-width="2.94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0b694c" officeooo:paragraph-rsid="000b694c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officeooo:rsid="0009255a"/>
    </style:style>
    <style:style style:name="T2" style:family="text">
      <style:text-properties officeooo:rsid="0009372c"/>
    </style:style>
    <style:style style:name="T3" style:family="text">
      <style:text-properties officeooo:rsid="0009c4ea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or <text:s/><text:span text:style-name="Strong_20_Emphasis">medical kiosk system (Forlinx OK-MX9352-C + Linux)</text:span> where <text:span text:style-name="Strong_20_Emphasis">CUPS is not available</text:span>, printing with a <text:span text:style-name="Strong_20_Emphasis">consumer inkjet printer</text:span> needs a different approach. Inkjet printers normally rely on <text:span text:style-name="Strong_20_Emphasis">CUPS + drivers</text:span>, so without it <text:span text:style-name="T1">we </text:span>must either:</text:p>
      <text:p text:style-name="Text_20_body">1️.Use <text:span text:style-name="Strong_20_Emphasis">driverless printing (IPP / IPP Everywhere)</text:span><text:line-break/>2️. Use <text:span text:style-name="Strong_20_Emphasis">vendor network protocol (HP JetDirect / RAW port 9100)</text:span><text:line-break/>3️. Send <text:span text:style-name="Strong_20_Emphasis">PDF/Image to printer over Wi-Fi</text:span><text:line-break/>4️. Use <text:span text:style-name="Strong_20_Emphasis">USB with low-level driver (hardest)</text:span></text:p>
      <text:p text:style-name="Text_20_body">Below is the <text:span text:style-name="Strong_20_Emphasis">practical recommendation for kiosk systems</text:span>.</text:p>
      <text:p text:style-name="Horizontal_20_Line"/>
      <text:h text:style-name="Heading_20_1" text:outline-level="1">Recommended Option (Best for Kiosk)</text:h>
      <text:h text:style-name="Heading_20_2" text:outline-level="2">Use <text:span text:style-name="Strong_20_Emphasis">Wi-Fi / Ethernet Printer with RAW Port 9100</text:span></text:h>
      <text:p text:style-name="Text_20_body">Most inkjet printers support <text:span text:style-name="Strong_20_Emphasis">JetDirect / RAW printing</text:span>.</text:p>
      <text:p text:style-name="Text_20_body">You simply <text:span text:style-name="Strong_20_Emphasis">send the print data directly to TCP port 9100</text:span>.</text:p>
      <text:p text:style-name="Text_20_body">Advantages</text:p>
      <text:p text:style-name="Text_20_body"><text:span text:style-name="T2">1.</text:span> No CUPS required<text:line-break/><text:span text:style-name="T2">2.</text:span> No printer drivers required<text:line-break/><text:span text:style-name="T2">3.</text:span> Works on embedded Linux<text:line-break/><text:span text:style-name="T2">4.</text:span> Very reliable for kiosks<text:line-break/><text:span text:style-name="T2">5.</text:span> Same method used in POS systems</text:p>
      <text:p text:style-name="Text_20_body">Architecture</text:p>
      <text:section text:style-name="Sect1" text:name="code-block-viewer">
        <text:p text:style-name="Preformatted_20_Text">Qt Application</text:p>
        <text:p text:style-name="Preformatted_20_Text"><text:s text:c="5"/>│</text:p>
        <text:p text:style-name="Preformatted_20_Text">PDF / Image / ESC</text:p>
        <text:p text:style-name="Preformatted_20_Text"><text:s text:c="5"/>│</text:p>
        <text:p text:style-name="Preformatted_20_Text">TCP Socket</text:p>
        <text:p text:style-name="Preformatted_20_Text"><text:s text:c="5"/>│</text:p>
        <text:p text:style-name="Preformatted_20_Text">Printer IP : 9100</text:p>
        <text:p text:style-name="Preformatted_20_Text"><text:s text:c="5"/>│</text:p>
        <text:p text:style-name="Preformatted_20_Text">Printer prints</text:p>
      </text:section>
      <text:p text:style-name="Text_20_body">Example printer IP</text:p>
      <text:section text:style-name="Sect1" text:name="Section1">
        <text:p text:style-name="Preformatted_20_Text"><text:bookmark text:name="code-block-viewer"/>192.168.1.100</text:p>
      </text:section>
      <text:p text:style-name="Horizontal_20_Line"/>
      <text:h text:style-name="Heading_20_1" text:outline-level="1">Simple C++ Raw Print Example</text:h>
      <text:section text:style-name="Sect1" text:name="Section2">
        <text:p text:style-name="Preformatted_20_Text"><text:bookmark text:name="code-block-viewer1"/>#include &lt;iostream&gt;</text:p>
        <text:p text:style-name="Preformatted_20_Text">#include &lt;sys/socket.h&gt;</text:p>
        <text:p text:style-name="Preformatted_20_Text">#include &lt;arpa/inet.h&gt;</text:p>
        <text:p text:style-name="Preformatted_20_Text">#include &lt;unistd.h&gt;</text:p>
        <text:p text:style-name="Preformatted_20_Text">int main()</text:p>
        <text:p text:style-name="Preformatted_20_Text">{</text:p>
        <text:p text:style-name="Preformatted_20_Text"><text:s text:c="4"/>int sock = socket(AF_INET, SOCK_STREAM, 0);</text:p>
        <text:p text:style-name="Preformatted_20_Text"><text:s text:c="4"/>sockaddr_in printer{};</text:p>
        <text:p text:style-name="Preformatted_20_Text"><text:soft-page-break/><text:s text:c="4"/>printer.sin_family = AF_INET;</text:p>
        <text:p text:style-name="Preformatted_20_Text"><text:s text:c="4"/>printer.sin_port = htons(9100);</text:p>
        <text:p text:style-name="Preformatted_20_Text"><text:s text:c="4"/>inet_pton(AF_INET, "192.168.1.100", &amp;printer.sin_addr);</text:p>
        <text:p text:style-name="Preformatted_20_Text"><text:s text:c="4"/>connect(sock, (sockaddr*)&amp;printer, sizeof(printer));</text:p>
        <text:p text:style-name="Preformatted_20_Text"><text:s text:c="4"/>const char *text = "Medical Kiosk Report\n\nBP:120/80\nTemp:36.7\n";</text:p>
        <text:p text:style-name="Preformatted_20_Text"><text:s text:c="4"/>send(sock, text, strlen(text), 0);</text:p>
        <text:p text:style-name="Preformatted_20_Text"><text:s text:c="4"/>close(sock);</text:p>
        <text:p text:style-name="Preformatted_20_Text">}</text:p>
      </text:section>
      <text:p text:style-name="Text_20_body">Compile</text:p>
      <text:section text:style-name="Sect1" text:name="Section3">
        <text:p text:style-name="Preformatted_20_Text"><text:bookmark text:name="code-block-viewer2"/>g++ print.cpp -o print</text:p>
      </text:section>
      <text:p text:style-name="Horizontal_20_Line"/>
      <text:h text:style-name="Heading_20_1" text:outline-level="1">If You Need Proper Reports (PDF)</text:h>
      <text:p text:style-name="Text_20_body">You generate a <text:span text:style-name="Strong_20_Emphasis">PDF report</text:span> and send it to printer.</text:p>
      <text:p text:style-name="Text_20_body">Tools used in kiosks:</text:p>
      <text:section text:style-name="Sect1" text:name="Section4">
        <text:p text:style-name="Preformatted_20_Text"><text:bookmark text:name="code-block-viewer3"/>Qt → QPrinter</text:p>
        <text:p text:style-name="Preformatted_20_Text">or</text:p>
        <text:p text:style-name="Preformatted_20_Text">wkhtmltopdf</text:p>
        <text:p text:style-name="Preformatted_20_Text">or</text:p>
        <text:p text:style-name="Preformatted_20_Text">reportlab (python)</text:p>
      </text:section>
      <text:p text:style-name="Text_20_body">But the printer must support:</text:p>
      <text:section text:style-name="Sect1" text:name="Section5">
        <text:p text:style-name="Preformatted_20_Text"><text:bookmark text:name="code-block-viewer4"/>PCL</text:p>
        <text:p text:style-name="Preformatted_20_Text">or</text:p>
        <text:p text:style-name="Preformatted_20_Text">PostScript</text:p>
        <text:p text:style-name="Preformatted_20_Text">or</text:p>
        <text:p text:style-name="Preformatted_20_Text">PDF direct</text:p>
      </text:section>
      <text:p text:style-name="Text_20_body">Most <text:span text:style-name="Strong_20_Emphasis">HP inkjet printers support PCL</text:span>.</text:p>
      <text:p text:style-name="Horizontal_20_Line"/>
      <text:h text:style-name="Heading_20_1" text:outline-level="1">USB Printing Without CUPS (Possible but Hard)</text:h>
      <text:p text:style-name="Text_20_body">USB printer path:</text:p>
      <text:section text:style-name="Sect1" text:name="Section6">
        <text:p text:style-name="Preformatted_20_Text"><text:bookmark text:name="code-block-viewer5"/>/dev/usb/lp0</text:p>
      </text:section>
      <text:p text:style-name="Text_20_body">Example:</text:p>
      <text:section text:style-name="Sect1" text:name="Section7">
        <text:p text:style-name="Preformatted_20_Text"><text:bookmark text:name="code-block-viewer6"/>echo "Test Print" &gt; /dev/usb/lp0</text:p>
      </text:section>
      <text:p text:style-name="Text_20_body">Problems</text:p>
      <text:p text:style-name="Text_20_body"><text:span text:style-name="T3">1.</text:span>Requires printer driver<text:line-break/><text:span text:style-name="T3">2.</text:span> Each printer uses different language<text:line-break/><text:span text:style-name="T3">3.</text:span> Many inkjets need raster driver</text:p>
      <text:p text:style-name="Text_20_body">For kiosks this becomes <text:span text:style-name="Strong_20_Emphasis">maintenance nightmare</text:span>.</text:p>
      <text:p text:style-name="Horizontal_20_Line"/>
      <text:h text:style-name="Heading_20_1" text:outline-level="1"><text:soft-page-break/>Wi-Fi vs USB (Recommendation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Reliability</text:p>
            </table:table-cell>
            <table:table-cell table:style-name="Table1.A1" office:value-type="string">
              <text:p text:style-name="Table_20_Heading">Maintenance</text:p>
            </table:table-cell>
            <table:table-cell table:style-name="Table1.A1" office:value-type="string">
              <text:p text:style-name="Table_20_Heading">Recommended</text:p>
            </table:table-cell>
          </table:table-row>
        </table:table-header-rows>
        <table:table-row>
          <table:table-cell table:style-name="Table1.A1" office:value-type="string">
            <text:p text:style-name="Table_20_Contents">USB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Hard</text:p>
          </table:table-cell>
          <table:table-cell table:style-name="Table1.A1" office:value-type="string">
            <text:p text:style-name="P1">NO</text:p>
          </table:table-cell>
        </table:table-row>
        <table:table-row>
          <table:table-cell table:style-name="Table1.A1" office:value-type="string">
            <text:p text:style-name="Table_20_Contents">Wi-Fi (RAW 9100)</text:p>
          </table:table-cell>
          <table:table-cell table:style-name="Table1.A1" office:value-type="string">
            <text:p text:style-name="Table_20_Contents">Very high</text:p>
          </table:table-cell>
          <table:table-cell table:style-name="Table1.A1" office:value-type="string">
            <text:p text:style-name="Table_20_Contents">Easy</text:p>
          </table:table-cell>
          <table:table-cell table:style-name="Table1.A1" office:value-type="string">
            <text:p text:style-name="P1">Yes</text:p>
          </table:table-cell>
        </table:table-row>
        <table:table-row>
          <table:table-cell table:style-name="Table1.A1" office:value-type="string">
            <text:p text:style-name="Table_20_Contents">IPP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Driverless but complex</text:p>
          </table:table-cell>
          <table:table-cell table:style-name="Table1.A1" office:value-type="string">
            <text:p text:style-name="P1">hard</text:p>
          </table:table-cell>
        </table:table-row>
      </table:table>
      <text:p text:style-name="Text_20_body">Best choice:</text:p>
      <text:section text:style-name="Sect1" text:name="Section8">
        <text:p text:style-name="Preformatted_20_Text"><text:bookmark text:name="code-block-viewer7"/>Wi-Fi / LAN printer</text:p>
        <text:p text:style-name="Preformatted_20_Text">RAW port 9100 printing</text:p>
      </text:section>
      <text:p text:style-name="Horizontal_20_Line"/>
      <text:h text:style-name="Heading_20_1" text:outline-level="1">Printer Brands That Work Best in Kiosks</text:h>
      <text:p text:style-name="Text_20_body">Recommended</text:p>
      <text:list xml:id="list1671905231" text:style-name="L1">
        <text:list-item>
          <text:p text:style-name="P2">HP OfficeJet series</text:p>
        </text:list-item>
        <text:list-item>
          <text:p text:style-name="P2">HP DeskJet series</text:p>
        </text:list-item>
        <text:list-item>
          <text:p text:style-name="P2">Brother InkBenefit</text:p>
        </text:list-item>
        <text:list-item>
          <text:p text:style-name="P2">Epson EcoTank (with network)</text:p>
        </text:list-item>
      </text:list>
      <text:p text:style-name="Text_20_body">Avoid</text:p>
      <text:list xml:id="list4085956905" text:style-name="L2">
        <text:list-item>
          <text:p text:style-name="P3">Cheap USB-only printers</text:p>
        </text:list-item>
      </text:list>
      <text:p text:style-name="Horizontal_20_Line"/>
      <text:h text:style-name="Heading_20_1" text:outline-level="1">Ideal Medical Kiosk Printing Flow</text:h>
      <text:section text:style-name="Sect1" text:name="Section9">
        <text:p text:style-name="Preformatted_20_Text"><text:bookmark text:name="code-block-viewer8"/>VitalsService</text:p>
        <text:p text:style-name="Preformatted_20_Text"><text:s text:c="6"/>│</text:p>
        <text:p text:style-name="Preformatted_20_Text">Result Model</text:p>
        <text:p text:style-name="Preformatted_20_Text"><text:s text:c="6"/>│</text:p>
        <text:p text:style-name="Preformatted_20_Text">Generate Report</text:p>
        <text:p text:style-name="Preformatted_20_Text"><text:s text:c="6"/>│</text:p>
        <text:p text:style-name="Preformatted_20_Text">PDF / Text</text:p>
        <text:p text:style-name="Preformatted_20_Text"><text:s text:c="6"/>│</text:p>
        <text:p text:style-name="Preformatted_20_Text">PrinterService</text:p>
        <text:p text:style-name="Preformatted_20_Text"><text:s text:c="6"/>│</text:p>
        <text:p text:style-name="Preformatted_20_Text">TCP 9100</text:p>
        <text:p text:style-name="Preformatted_20_Text"><text:s text:c="6"/>│</text:p>
        <text:p text:style-name="Preformatted_20_Text">Inkjet Printer</text:p>
      </text:section>
      <text:p text:style-name="Horizontal_20_Line"/>
      <text:h text:style-name="Heading_20_1" text:outline-level="1">Pro Tip for Medical Kiosks</text:h>
      <text:p text:style-name="Text_20_body">Most real medical kiosks <text:span text:style-name="Strong_20_Emphasis">do not use inkjet printers</text:span>.</text:p>
      <text:p text:style-name="Text_20_body">They use:</text:p>
      <text:p text:style-name="Text_20_body"><text:span text:style-name="Strong_20_Emphasis">Thermal printers</text:span></text:p>
      <text:p text:style-name="Text_20_body"><text:soft-page-break/>Advantages</text:p>
      <text:list xml:id="list47441059" text:style-name="L3">
        <text:list-item>
          <text:p text:style-name="P4">No ink</text:p>
        </text:list-item>
        <text:list-item>
          <text:p text:style-name="P4">Very reliable</text:p>
        </text:list-item>
        <text:list-item>
          <text:p text:style-name="P4">Fast</text:p>
        </text:list-item>
        <text:list-item>
          <text:p text:style-name="P4">Cheap</text:p>
        </text:list-item>
        <text:list-item>
          <text:p text:style-name="P4">ESC/POS compatible</text:p>
        </text:list-item>
      </text:list>
      <text:p text:style-name="Text_20_body">Example</text:p>
      <text:section text:style-name="Sect1" text:name="Section10">
        <text:p text:style-name="Preformatted_20_Text"><text:bookmark text:name="code-block-viewer9"/>80mm Thermal Printer</text:p>
      </text:section>
      <text:p text:style-name="Standard"/>
      <text:p text:style-name="Text_20_body">For testing <text:span text:style-name="Strong_20_Emphasis">Wi-Fi printing with the Epson L3250</text:span>, the easiest method <text:span text:style-name="Strong_20_Emphasis">without CUPS</text:span> on your Linux kiosk is <text:span text:style-name="Strong_20_Emphasis">RAW TCP printing (JetDirect protocol) on port 9100</text:span>.<text:line-break/>Most Epson network printers, including the <text:span text:style-name="Strong_20_Emphasis">L3250</text:span>, accept data on <text:span text:style-name="Strong_20_Emphasis">TCP port 9100</text:span>.</text:p>
      <text:p text:style-name="Text_20_body">This lets your <text:span text:style-name="Strong_20_Emphasis">Forlinx OK-MX9352-C Linux kiosk</text:span> send print data directly.</text:p>
      <text:p text:style-name="Horizontal_20_Line"/>
      <text:h text:style-name="Heading_20_1" text:outline-level="1">1. Find the Printer IP</text:h>
      <text:p text:style-name="Text_20_body">On the printer:</text:p>
      <text:section text:style-name="Sect1" text:name="Section11">
        <text:p text:style-name="Preformatted_20_Text"><text:bookmark text:name="code-block-viewer10"/>Home → Settings → Network Settings → Wi-Fi Status</text:p>
      </text:section>
      <text:p text:style-name="Text_20_body">Example:</text:p>
      <text:section text:style-name="Sect1" text:name="Section12">
        <text:p text:style-name="Preformatted_20_Text"><text:bookmark text:name="code-block-viewer11"/>Printer IP: 192.168.1.55</text:p>
      </text:section>
      <text:p text:style-name="Text_20_body">You can also check from Linux:</text:p>
      <text:section text:style-name="Sect1" text:name="Section13">
        <text:p text:style-name="Preformatted_20_Text"><text:bookmark text:name="code-block-viewer12"/>arp -a</text:p>
      </text:section>
      <text:p text:style-name="Text_20_body">or</text:p>
      <text:section text:style-name="Sect1" text:name="Section14">
        <text:p text:style-name="Preformatted_20_Text"><text:bookmark text:name="code-block-viewer13"/>ping 192.168.1.55</text:p>
      </text:section>
      <text:p text:style-name="Horizontal_20_Line"/>
      <text:h text:style-name="Heading_20_1" text:outline-level="1">2. Quick Network Test</text:h>
      <text:p text:style-name="Text_20_body">Test connection to port <text:span text:style-name="Strong_20_Emphasis">9100</text:span>:</text:p>
      <text:section text:style-name="Sect1" text:name="Section15">
        <text:p text:style-name="Preformatted_20_Text"><text:bookmark text:name="code-block-viewer14"/>nc 192.168.1.55 9100</text:p>
      </text:section>
      <text:p text:style-name="Text_20_body">If connection opens, the printer supports <text:span text:style-name="Strong_20_Emphasis">RAW printing</text:span>.</text:p>
      <text:p text:style-name="Text_20_body">Exit with:</text:p>
      <text:section text:style-name="Sect1" text:name="Section16">
        <text:p text:style-name="Preformatted_20_Text"><text:bookmark text:name="code-block-viewer15"/>CTRL + C</text:p>
      </text:section>
      <text:p text:style-name="Horizontal_20_Line"/>
      <text:h text:style-name="Heading_20_1" text:outline-level="1">3. Simple Wi-Fi Print Test (Linux)</text:h>
      <text:p text:style-name="Text_20_body">Create a test file.</text:p>
      <text:section text:style-name="Sect1" text:name="Section17">
        <text:p text:style-name="Preformatted_20_Text"><text:bookmark text:name="code-block-viewer16"/>echo "Medical Kiosk Test Print" &gt; test.txt</text:p>
      </text:section>
      <text:p text:style-name="Text_20_body"><text:soft-page-break/>Send to printer:</text:p>
      <text:section text:style-name="Sect1" text:name="Section18">
        <text:p text:style-name="Preformatted_20_Text"><text:bookmark text:name="code-block-viewer17"/>cat test.txt | nc 192.168.1.55 9100</text:p>
      </text:section>
      <text:p text:style-name="Text_20_body">If supported, the printer will print immediately.</text:p>
      <text:p text:style-name="Horizontal_20_Line"/>
      <text:h text:style-name="Heading_20_1" text:outline-level="1">4. C++ Wi-Fi Printing Example</text:h>
      <text:p text:style-name="Text_20_body">This is suitable for your <text:span text:style-name="Strong_20_Emphasis">kiosk printer service</text:span>.</text:p>
      <text:section text:style-name="Sect1" text:name="Section19">
        <text:p text:style-name="Preformatted_20_Text"><text:bookmark text:name="code-block-viewer18"/>#include &lt;iostream&gt;</text:p>
        <text:p text:style-name="Preformatted_20_Text">#include &lt;sys/socket.h&gt;</text:p>
        <text:p text:style-name="Preformatted_20_Text">#include &lt;arpa/inet.h&gt;</text:p>
        <text:p text:style-name="Preformatted_20_Text">#include &lt;unistd.h&gt;</text:p>
        <text:p text:style-name="Preformatted_20_Text">#include &lt;cstring&gt;</text:p>
        <text:p text:style-name="Preformatted_20_Text">#define PRINTER_IP "192.168.1.55"</text:p>
        <text:p text:style-name="Preformatted_20_Text">#define PRINTER_PORT 9100</text:p>
        <text:p text:style-name="Preformatted_20_Text">int main()</text:p>
        <text:p text:style-name="Preformatted_20_Text">{</text:p>
        <text:p text:style-name="Preformatted_20_Text"><text:s text:c="4"/>int sock = socket(AF_INET, SOCK_STREAM, 0);</text:p>
        <text:p text:style-name="Preformatted_20_Text"><text:s text:c="4"/>sockaddr_in printer{};</text:p>
        <text:p text:style-name="Preformatted_20_Text"><text:s text:c="4"/>printer.sin_family = AF_INET;</text:p>
        <text:p text:style-name="Preformatted_20_Text"><text:s text:c="4"/>printer.sin_port = htons(PRINTER_PORT);</text:p>
        <text:p text:style-name="Preformatted_20_Text"><text:s text:c="4"/>inet_pton(AF_INET, PRINTER_IP, &amp;printer.sin_addr);</text:p>
        <text:p text:style-name="Preformatted_20_Text"><text:s text:c="4"/>if(connect(sock,(sockaddr*)&amp;printer,sizeof(printer)) &lt; 0)</text:p>
        <text:p text:style-name="Preformatted_20_Text"><text:s text:c="4"/>{</text:p>
        <text:p text:style-name="Preformatted_20_Text"><text:s text:c="8"/>std::cout&lt;&lt;"Printer connection failed\n";</text:p>
        <text:p text:style-name="Preformatted_20_Text"><text:s text:c="8"/>return -1;</text:p>
        <text:p text:style-name="Preformatted_20_Text"><text:s text:c="4"/>}</text:p>
        <text:p text:style-name="Preformatted_20_Text"><text:s text:c="4"/>const char *data =</text:p>
        <text:p text:style-name="Preformatted_20_Text"><text:s text:c="8"/>"=====================\n"</text:p>
        <text:p text:style-name="Preformatted_20_Text"><text:s text:c="8"/>" Medical Kiosk Test\n"</text:p>
        <text:p text:style-name="Preformatted_20_Text"><text:s text:c="8"/>"=====================\n"</text:p>
        <text:p text:style-name="Preformatted_20_Text"><text:s text:c="8"/>"BP: 120/80\n"</text:p>
        <text:p text:style-name="Preformatted_20_Text"><text:s text:c="8"/>"Temp: 36.7 C\n"</text:p>
        <text:p text:style-name="Preformatted_20_Text"><text:s text:c="8"/>"SpO2: 98%\n\n";</text:p>
        <text:p text:style-name="Preformatted_20_Text"><text:s text:c="4"/>send(sock,data,strlen(data),0);</text:p>
        <text:p text:style-name="Preformatted_20_Text"><text:s text:c="4"/>close(sock);</text:p>
        <text:p text:style-name="Preformatted_20_Text"><text:s text:c="4"/>std::cout&lt;&lt;"Print sent\n";</text:p>
        <text:p text:style-name="Preformatted_20_Text">}</text:p>
      </text:section>
      <text:p text:style-name="Text_20_body">Compile:</text:p>
      <text:section text:style-name="Sect1" text:name="Section20">
        <text:p text:style-name="Preformatted_20_Text"><text:bookmark text:name="code-block-viewer19"/>g++ wifi_print.cpp -o wifi_print</text:p>
      </text:section>
      <text:p text:style-name="Text_20_body">Run:</text:p>
      <text:section text:style-name="Sect1" text:name="Section21">
        <text:p text:style-name="Preformatted_20_Text"><text:bookmark text:name="code-block-viewer20"/>./wifi_print</text:p>
      </text:section>
      <text:p text:style-name="Horizontal_20_Line"/>
      <text:h text:style-name="Heading_20_1" text:outline-level="1">5. For Printing Full Reports</text:h>
      <text:p text:style-name="Text_20_body">Typical kiosk workflow:</text:p>
      <text:section text:style-name="Sect1" text:name="Section22">
        <text:p text:style-name="Preformatted_20_Text"><text:bookmark text:name="code-block-viewer21"/>Vitals Result</text:p>
        <text:p text:style-name="Preformatted_20_Text"><text:s text:c="5"/>↓</text:p>
        <text:p text:style-name="Preformatted_20_Text">Generate HTML / PDF</text:p>
        <text:p text:style-name="Preformatted_20_Text"><text:s text:c="5"/>↓</text:p>
        <text:p text:style-name="Preformatted_20_Text">Convert to image or raster</text:p>
        <text:p text:style-name="Preformatted_20_Text"><text:s text:c="5"/>↓</text:p>
        <text:p text:style-name="Preformatted_20_Text">Send to printer via TCP 9100</text:p>
      </text:section>
      <text:p text:style-name="Text_20_body"><text:soft-page-break/>Example tools:</text:p>
      <text:section text:style-name="Sect1" text:name="Section23">
        <text:p text:style-name="Preformatted_20_Text"><text:bookmark text:name="code-block-viewer22"/>wkhtmltopdf</text:p>
        <text:p text:style-name="Preformatted_20_Text">Qt QTextDocument</text:p>
        <text:p text:style-name="Preformatted_20_Text">ImageMagick</text:p>
      </text:section>
      <text:p text:style-name="Horizontal_20_Line"/>
      <text:h text:style-name="Heading_20_1" text:outline-level="1">6. Recommended Printer Mode for Epson</text:h>
      <text:p text:style-name="Text_20_body">Best configuration:</text:p>
      <text:section text:style-name="Sect1" text:name="Section24">
        <text:p text:style-name="Preformatted_20_Text"><text:bookmark text:name="code-block-viewer23"/>Connection: Wi-Fi</text:p>
        <text:p text:style-name="Preformatted_20_Text">Protocol: RAW TCP</text:p>
        <text:p text:style-name="Preformatted_20_Text">Port: 9100</text:p>
        <text:p text:style-name="Preformatted_20_Text">Data: Text / Raster</text:p>
      </text:section>
      <text:p text:style-name="Text_20_body">Avoid:</text:p>
      <text:section text:style-name="Sect1" text:name="Section25">
        <text:p text:style-name="Preformatted_20_Text"><text:bookmark text:name="code-block-viewer24"/>USB (needs drivers)</text:p>
        <text:p text:style-name="Preformatted_20_Text">IPP (needs CUPS)</text:p>
      </text:section>
      <text:p text:style-name="Horizontal_20_Line"/>
      <text:h text:style-name="Heading_20_1" text:outline-level="1">7. Kiosk Printing Architecture</text:h>
      <text:section text:style-name="Sect1" text:name="Section26">
        <text:p text:style-name="Preformatted_20_Text"><text:bookmark text:name="code-block-viewer25"/>UI Layer</text:p>
        <text:p text:style-name="Preformatted_20_Text"><text:s text:c="3"/>↓</text:p>
        <text:p text:style-name="Preformatted_20_Text">Controller</text:p>
        <text:p text:style-name="Preformatted_20_Text"><text:s text:c="3"/>↓</text:p>
        <text:p text:style-name="Preformatted_20_Text">PrinterService</text:p>
        <text:p text:style-name="Preformatted_20_Text"><text:s text:c="3"/>↓</text:p>
        <text:p text:style-name="Preformatted_20_Text">TCP Socket</text:p>
        <text:p text:style-name="Preformatted_20_Text"><text:s text:c="3"/>↓</text:p>
        <text:p text:style-name="Preformatted_20_Text">Epson L3250 (Wi-Fi)</text:p>
      </text:section>
      <text:p text:style-name="Horizontal_20_Line"/>
      <text:p text:style-name="Text_20_body">✅ <text:span text:style-name="Strong_20_Emphasis">Best for your medical kiosk</text:span></text:p>
      <text:section text:style-name="Sect1" text:name="Section27">
        <text:p text:style-name="Preformatted_20_Text"><text:bookmark text:name="code-block-viewer26"/>Wi-Fi printer</text:p>
        <text:p text:style-name="Preformatted_20_Text">RAW port 9100</text:p>
        <text:p text:style-name="Preformatted_20_Text">Direct socket printing</text:p>
      </text:section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22:21:48.324387513</meta:creation-date>
    <dc:date>2026-03-17T16:37:38.399524309</dc:date>
    <meta:editing-duration>PT15M23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6" meta:paragraph-count="212" meta:word-count="742" meta:character-count="5008" meta:non-whitespace-character-count="4256"/>
  </office:meta>
</office:document-meta>
</file>